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ear Seth and Conor, </text:p>
      <text:p text:style-name="Standard"/>
      <text:p text:style-name="Standard">I hope this email finds you both well, and everything is going alright there in Bristol. It took me a while, but I'm finally reaching out with a working code and a few first results to share to resume the project we started back in June. </text:p>
      <text:p text:style-name="Standard"/>
      <text:p text:style-name="Standard">I have been absorbed in the last few months by the relocation back to Italy and by getting back to my old job. I managed to restart the project though. The porting of the semi-supervised ILM to C#, to allow its integration with the Unity environment has proved to be quite hard. I redid it from scratch and I have been struggling for weeks to make it work - crosschecking if the weights initialisation of the encoder in Python gave different results in C# and vice versa, crosstesting the initial language, trying out an alternative initial language manually defined, checking the encoder in a standalone modality without the generational process, adding Adam optimiser and L2, disabling alternatively encoder, decoder and autoencoder...</text:p>
      <text:p text:style-name="Standard"/>
      <text:p text:style-name="Standard">Now, it works. So, I generated a series of experiments, tweaking the parameters of the model (and repeating the same experiment 30 times to get more robust results): number of epochs per generation, learning rate, noise (I added the possibility to add noise in the language generated by the tutor at each new generation), A size, B size, and the number of loops of training of encoder, decoder and autoencoder (the standard is 1/1/20 but it can be set 1/1/1 or 10/1/1, or even 1/1/0, excluding the autoencoder altogether).</text:p>
      <text:p text:style-name="Standard"/>
      <text:p text:style-name="Standard">As you can see from the attached graphs, I started (graph01) from learning rate 1, noise 0, A and B size 75 and loops 1/1/20, configuration with which the language reaches Stability, Expressivity and Compositionality 1 around generation 20.</text:p>
      <text:p text:style-name="Standard"/>
      <text:p text:style-name="P1">CHANGING LEARNING RATE</text:p>
      <text:p text:style-name="Standard">With learning rate 0.5 (graph02), the curve of Stability remains the same (actually, it seems to gain something) while Expressivity and Compositionality rise more slowly.</text:p>
      <text:p text:style-name="Standard"/>
      <text:p text:style-name="Standard">With learning rate 0.1 (graph 03), the three variables remain quite low, they reach not even 0.4.</text:p>
      <text:p text:style-name="Standard"/>
      <text:p text:style-name="Standard">What about with a higher learning rate? With 2 (graph04), Stability stops around 0.6 and Expressivity and Compositionality remain around 0.5.</text:p>
      <text:p text:style-name="Standard"/>
      <text:p text:style-name="Standard">With a learning rate of 5 (graph 05), the three variables remain under 0.2.</text:p>
      <text:p text:style-name="Standard"/>
      <text:p text:style-name="P1">ENCODER/DECODER/AUTOENCODER TRAINING LOOPS RATIO</text:p>
      <text:p text:style-name="Standard">Having set the learning rate to 1, then, what happens when we reduce the number of training loops of the autoencoder? We had so far 20 loops for every loop of encoder and of decoder (1/1/20). With one loop of autoencoder, configuration 1/1/1 (graph06), we get the same results as with learning rate 5: the three variables remain under 0.2.</text:p>
      <text:p text:style-name="Standard"/>
      <text:p text:style-name="Standard">The same happens if we remove the autoencoder completely (1/1/0, graph07), and if we remove the decoder too (1/0/0, graph08).</text:p>
      <text:p text:style-name="Standard"/>
      <text:p text:style-name="Standard">Can we compensate with more loops of encoder and decoder? No. With 10/10/1 and 10/10/0 (graph09 and graph10), the results do not change.</text:p>
      <text:p text:style-name="Standard"/>
      <text:p text:style-name="P1">EPOCHS</text:p>
      <text:p text:style-name="Standard"><text:soft-page-break/>Let's go back to our original configuration then and let's change the number of epochs. If we reduce the number of training epochs per generation to 10 (graph11), unsurprisingly we see that the curves rise more slowly than with 30 epochs (graph01) and, at generation 50, they are still rising.</text:p>
      <text:p text:style-name="Standard"/>
      <text:p text:style-name="Standard">On the opposite side, If we train 100 epochs per generation (graph12), the three curves do not seem to converge on 1 faster, quite the contrary.</text:p>
      <text:p text:style-name="Standard"/>
      <text:p text:style-name="P1">A SIZE</text:p>
      <text:p text:style-name="Standard">I tested several sizes of A (with 30 epochs). We need to reduce it drastically to see a difference. If we decrease it to 2 (graph13), the curve rise more slowly and at generation 50 they are still well under 0.8.</text:p>
      <text:p text:style-name="Standard"/>
      <text:p text:style-name="Standard">If A size is 3, at generation 50 they reach 1.</text:p>
      <text:p text:style-name="Standard"/>
      <text:p text:style-name="Standard">With size 4, the curves seem quite close to graph 1 (A size 75). I tested 4, 5, 10, 15, 30, 60, 90, 120, and 256: the curves seem to be steeper as the number rises, but not significantly.</text:p>
      <text:p text:style-name="Standard"/>
      <text:p text:style-name="P1">B SIZE</text:p>
      <text:p text:style-name="Standard">What about B size? When B size is 2, the curves remain flat (graph29). They rise with 20 (graph30), but they reach 1 at generation 50 only with a B size of at least 30 (graph31). With 60, 120 and 256 the situation seems to get closer to graph 1. </text:p>
      <text:p text:style-name="Standard"/>
      <text:p text:style-name="Standard">The interesting point here is that - while the rise of Stability, Expressivity and Compositionality stops when either A or B size gets too low, it does seem to grow faster when A and B size approach 256, which is the total number of signal-meaning pairs in the language. In other words, the bottleneck created by the exposure to a limited number of pairs does not seem to be necessary for the language to develop the three properties.</text:p>
      <text:p text:style-name="Standard"/>
      <text:p text:style-name="P1">NOISE</text:p>
      <text:p text:style-name="Standard">As for the noise, if we go back to the configuration of graph 1 and add some noise (graph35), the situation does not seem to change much. Increasing it to 0.2 (graph36), 0.3 (graph37) and so on, even 1 (graph44) and 1.1 (graph45) does not seem to have much of an influence either.</text:p>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7T21:59:38.603410929</meta:creation-date>
    <dc:date>2025-12-07T21:59:56.486789986</dc:date>
    <meta:editing-duration>PT18S</meta:editing-duration>
    <meta:editing-cycles>1</meta:editing-cycles>
    <meta:document-statistic meta:table-count="0" meta:image-count="0" meta:object-count="0" meta:page-count="2" meta:paragraph-count="26" meta:word-count="840" meta:character-count="4776" meta:non-whitespace-character-count="3959"/>
    <meta:generator>LibreOffice/25.2.6.2$Linux_X86_64 LibreOffice_project/40d1a0e1d5bdf1afaeae24d9ece32bbb00fa66a4</meta:generator>
  </office:meta>
</office:document-meta>
</file>